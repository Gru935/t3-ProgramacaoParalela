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335in" svg:height="5.5425in" svg:x="5.8512in" svg:y="2.6457in">
            <draw:object draw:notify-on-update-of-ranges="Sheet1.A4:Sheet1.A13 Sheet1.G3:Sheet1.G3 Sheet1.G4:Sheet1.G13 Sheet1.O3:Sheet1.O3 Sheet1.O4:Sheet1.O13 Sheet1.E3:Sheet1.E3 Sheet1.E4:Sheet1.E13 Sheet1.M3:Sheet1.M3 Sheet1.M4:Sheet1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5"/>
        <table:table-column table:style-name="co6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ce5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EM BALANCEAMENTO</text:p>
          </table:table-cell>
          <table:table-cell table:number-columns-repeated="7"/>
          <table:table-cell table:style-name="ce8" office:value-type="string" calcext:value-type="string">
            <text:p>COM BALANCEAMENTO</text:p>
          </table:table-cell>
          <table:table-cell table:number-columns-repeated="2"/>
          <table:table-cell table:style-name="ce2" table:number-columns-repeated="4"/>
          <table:table-cell/>
          <table:table-cell table:style-name="ce11" office:value-type="string" calcext:value-type="string">
            <text:p>IDEAL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11"/>
          <table:table-cell table:style-name="ce2" table:number-columns-repeated="4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<text:s/>Processos</text:p>
          </table:table-cell>
          <table:table-cell table:style-name="ce2"/>
          <table:table-cell table:style-name="ce2" office:value-type="string" calcext:value-type="string">
            <text:p>Tempo de execução (s)</text:p>
          </table:table-cell>
          <table:table-cell table:style-name="ce2"/>
          <table:table-cell table:style-name="ce2" office:value-type="string" calcext:value-type="string">
            <text:p>Speed-up (sem balanceamento)</text:p>
          </table:table-cell>
          <table:table-cell table:style-name="ce2"/>
          <table:table-cell table:style-name="ce2" office:value-type="string" calcext:value-type="string">
            <text:p>Eficiência (sem balanceamento)</text:p>
          </table:table-cell>
          <table:table-cell/>
          <table:table-cell table:style-name="ce2" office:value-type="string" calcext:value-type="string">
            <text:p>Processos</text:p>
          </table:table-cell>
          <table:table-cell table:style-name="ce10"/>
          <table:table-cell table:style-name="ce10" office:value-type="string" calcext:value-type="string">
            <text:p>Tempo de execução (s)</text:p>
          </table:table-cell>
          <table:table-cell table:style-name="ce2"/>
          <table:table-cell table:style-name="ce2" office:value-type="string" calcext:value-type="string">
            <text:p>Speed-up (com balanceamento)</text:p>
          </table:table-cell>
          <table:table-cell table:style-name="ce2"/>
          <table:table-cell table:style-name="ce2" office:value-type="string" calcext:value-type="string">
            <text:p>Eficiência (com balanceamento)</text:p>
          </table:table-cell>
          <table:table-cell/>
          <table:table-cell table:style-name="ce2" office:value-type="string" calcext:value-type="string">
            <text:p>Processos</text:p>
          </table:table-cell>
          <table:table-cell table:style-name="ce10"/>
          <table:table-cell table:style-name="ce2" office:value-type="string" calcext:value-type="string">
            <text:p>Speed-up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278.34" calcext:value-type="float">
            <text:p>3278.34</text:p>
          </table:table-cell>
          <table:table-cell table:style-name="ce2"/>
          <table:table-cell table:style-name="ce2" table:formula="of:=([.C4]/[.C4])" office:value-type="float" office:value="1" calcext:value-type="float">
            <text:p>1</text:p>
          </table:table-cell>
          <table:table-cell table:style-name="ce2"/>
          <table:table-cell table:style-name="ce2" table:formula="of:=([.E4]/[.A4])" office:value-type="float" office:value="1" calcext:value-type="float">
            <text:p>1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3278.34" calcext:value-type="float">
            <text:p>3278.34</text:p>
          </table:table-cell>
          <table:table-cell table:style-name="ce2"/>
          <table:table-cell table:style-name="ce2" table:formula="of:=([.K4]/[.K4])" office:value-type="float" office:value="1" calcext:value-type="float">
            <text:p>1</text:p>
          </table:table-cell>
          <table:table-cell table:style-name="ce2"/>
          <table:table-cell table:style-name="ce2" table:formula="of:=([.M4]/[.I4])" office:value-type="float" office:value="1" calcext:value-type="float">
            <text:p>1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080" calcext:value-type="float">
            <text:p>1080</text:p>
          </table:table-cell>
          <table:table-cell table:style-name="ce2"/>
          <table:table-cell table:style-name="ce2" table:formula="of:=([.C4]/[.C5])" office:value-type="float" office:value="3.0355" calcext:value-type="float">
            <text:p>3.0355</text:p>
          </table:table-cell>
          <table:table-cell table:style-name="ce2"/>
          <table:table-cell table:style-name="ce2" table:formula="of:=([.E5]/[.A5])" office:value-type="float" office:value="1.01183333333333" calcext:value-type="float">
            <text:p>1.01183333333333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972.09" calcext:value-type="float">
            <text:p>972.09</text:p>
          </table:table-cell>
          <table:table-cell table:style-name="ce2"/>
          <table:table-cell table:style-name="ce2" table:formula="of:=([.K4]/[.K5])" office:value-type="float" office:value="3.37246551245255" calcext:value-type="float">
            <text:p>3.37246551245255</text:p>
          </table:table-cell>
          <table:table-cell table:style-name="ce2"/>
          <table:table-cell table:style-name="ce2" table:formula="of:=([.M5]/[.I5])" office:value-type="float" office:value="0.843116378113138" calcext:value-type="float">
            <text:p>0.843116378113138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92.67" calcext:value-type="float">
            <text:p>392.67</text:p>
          </table:table-cell>
          <table:table-cell table:style-name="ce2"/>
          <table:table-cell table:style-name="ce2" table:formula="of:=([.C4]/[.C6])" office:value-type="float" office:value="8.34884253953702" calcext:value-type="float">
            <text:p>8.34884253953702</text:p>
          </table:table-cell>
          <table:table-cell table:style-name="ce2"/>
          <table:table-cell table:style-name="ce2" table:formula="of:=([.E6]/[.A6])" office:value-type="float" office:value="1.19269179136243" calcext:value-type="float">
            <text:p>1.19269179136243</text:p>
          </table:table-cell>
          <table:table-cell table:style-name="ce7"/>
          <table:table-cell table:style-name="ce2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241.57" calcext:value-type="float">
            <text:p>241.57</text:p>
          </table:table-cell>
          <table:table-cell table:style-name="ce2"/>
          <table:table-cell table:style-name="ce2" table:formula="of:=([.K4]/[.K6])" office:value-type="float" office:value="13.570973216873" calcext:value-type="float">
            <text:p>13.570973216873</text:p>
          </table:table-cell>
          <table:table-cell table:style-name="ce2"/>
          <table:table-cell table:style-name="ce2" table:formula="of:=([.M6]/[.I6])" office:value-type="float" office:value="1.69637165210912" calcext:value-type="float">
            <text:p>1.69637165210912</text:p>
          </table:table-cell>
          <table:table-cell table:style-name="ce7"/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2" office:value-type="float" office:value="7" calcext:value-type="float">
            <text:p>7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4.31" calcext:value-type="float">
            <text:p>104.31</text:p>
          </table:table-cell>
          <table:table-cell table:style-name="ce2"/>
          <table:table-cell table:style-name="ce2" table:formula="of:=([.C4]/[.C7])" office:value-type="float" office:value="31.4288179465056" calcext:value-type="float">
            <text:p>31.4288179465056</text:p>
          </table:table-cell>
          <table:table-cell table:style-name="ce2"/>
          <table:table-cell table:style-name="ce2" table:formula="of:=([.E7]/[.A7])" office:value-type="float" office:value="2.09525452976704" calcext:value-type="float">
            <text:p>2.09525452976704</text:p>
          </table:table-cell>
          <table:table-cell table:style-name="ce7"/>
          <table:table-cell table:style-name="ce2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64.42" calcext:value-type="float">
            <text:p>64.42</text:p>
          </table:table-cell>
          <table:table-cell table:style-name="ce2"/>
          <table:table-cell table:style-name="ce2" table:formula="of:=([.K4]/[.K7])" office:value-type="float" office:value="50.8900962434027" calcext:value-type="float">
            <text:p>50.8900962434027</text:p>
          </table:table-cell>
          <table:table-cell table:style-name="ce2"/>
          <table:table-cell table:style-name="ce2" table:formula="of:=([.M7]/[.I7])" office:value-type="float" office:value="3.18063101521267" calcext:value-type="float">
            <text:p>3.18063101521267</text:p>
          </table:table-cell>
          <table:table-cell table:style-name="ce7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26.02" calcext:value-type="float">
            <text:p>26.02</text:p>
          </table:table-cell>
          <table:table-cell table:style-name="ce2"/>
          <table:table-cell table:style-name="ce2" table:formula="of:=([.C4]/[.C8])" office:value-type="float" office:value="125.993082244427" calcext:value-type="float">
            <text:p>125.993082244427</text:p>
          </table:table-cell>
          <table:table-cell table:style-name="ce2"/>
          <table:table-cell table:style-name="ce2" table:formula="of:=([.E8]/[.A8])" office:value-type="float" office:value="4.06429297562669" calcext:value-type="float">
            <text:p>4.06429297562669</text:p>
          </table:table-cell>
          <table:table-cell table:style-name="ce7"/>
          <table:table-cell table:style-name="ce2" office:value-type="float" office:value="32" calcext:value-type="float">
            <text:p>32</text:p>
          </table:table-cell>
          <table:table-cell table:style-name="ce10"/>
          <table:table-cell table:style-name="ce10" office:value-type="float" office:value="15.98" calcext:value-type="float">
            <text:p>15.98</text:p>
          </table:table-cell>
          <table:table-cell table:style-name="ce2"/>
          <table:table-cell table:style-name="ce2" table:formula="of:=([.K4]/[.K8])" office:value-type="float" office:value="205.152690863579" calcext:value-type="float">
            <text:p>205.152690863579</text:p>
          </table:table-cell>
          <table:table-cell table:style-name="ce2"/>
          <table:table-cell table:style-name="ce2" table:formula="of:=([.M8]/[.I8])" office:value-type="float" office:value="6.41102158948686" calcext:value-type="float">
            <text:p>6.41102158948686</text:p>
          </table:table-cell>
          <table:table-cell table:style-name="ce7"/>
          <table:table-cell table:style-name="ce2" office:value-type="float" office:value="31" calcext:value-type="float">
            <text:p>31</text:p>
          </table:table-cell>
          <table:table-cell table:style-name="ce10"/>
          <table:table-cell table:style-name="ce2" office:value-type="float" office:value="31" calcext:value-type="float">
            <text:p>31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2" office:value-type="float" office:value="165.33" calcext:value-type="float">
            <text:p>165.33</text:p>
          </table:table-cell>
          <table:table-cell table:style-name="ce2"/>
          <table:table-cell table:style-name="ce2" table:formula="of:=([.C4]/[.C9])" office:value-type="float" office:value="19.8290691344584" calcext:value-type="float">
            <text:p>19.8290691344584</text:p>
          </table:table-cell>
          <table:table-cell table:style-name="ce2"/>
          <table:table-cell table:style-name="ce2" table:formula="of:=([.E9]/[.A9])" office:value-type="float" office:value="0.314747129118387" calcext:value-type="float">
            <text:p>0.314747129118387</text:p>
          </table:table-cell>
          <table:table-cell table:style-name="ce7"/>
          <table:table-cell table:style-name="ce2" office:value-type="float" office:value="64" calcext:value-type="float">
            <text:p>64</text:p>
          </table:table-cell>
          <table:table-cell table:style-name="ce10"/>
          <table:table-cell table:style-name="ce10" office:value-type="float" office:value="63.78" calcext:value-type="float">
            <text:p>63.78</text:p>
          </table:table-cell>
          <table:table-cell table:style-name="ce2"/>
          <table:table-cell table:style-name="ce2" table:formula="of:=([.K4]/[.K9])" office:value-type="float" office:value="51.4007525870179" calcext:value-type="float">
            <text:p>51.4007525870179</text:p>
          </table:table-cell>
          <table:table-cell table:style-name="ce2"/>
          <table:table-cell table:style-name="ce2" table:formula="of:=([.M9]/[.I9])" office:value-type="float" office:value="0.803136759172154" calcext:value-type="float">
            <text:p>0.803136759172154</text:p>
          </table:table-cell>
          <table:table-cell table:style-name="ce7"/>
          <table:table-cell table:style-name="ce2" office:value-type="float" office:value="63" calcext:value-type="float">
            <text:p>63</text:p>
          </table:table-cell>
          <table:table-cell table:style-name="ce10"/>
          <table:table-cell table:style-name="ce2" office:value-type="float" office:value="63" calcext:value-type="float">
            <text:p>63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/>
          <table:table-cell table:style-name="ce2" office:value-type="float" office:value="56.9" calcext:value-type="float">
            <text:p>56.9</text:p>
          </table:table-cell>
          <table:table-cell table:style-name="ce2"/>
          <table:table-cell table:style-name="ce2" table:formula="of:=([.C4]/[.C10])" office:value-type="float" office:value="57.6158172231986" calcext:value-type="float">
            <text:p>57.6158172231986</text:p>
          </table:table-cell>
          <table:table-cell table:style-name="ce2"/>
          <table:table-cell table:style-name="ce2" table:formula="of:=([.E10]/[.A10])" office:value-type="float" office:value="0.45366785215117" calcext:value-type="float">
            <text:p>0.45366785215117</text:p>
          </table:table-cell>
          <table:table-cell table:style-name="ce7"/>
          <table:table-cell table:style-name="ce2" office:value-type="float" office:value="128" calcext:value-type="float">
            <text:p>128</text:p>
          </table:table-cell>
          <table:table-cell table:style-name="ce10"/>
          <table:table-cell table:style-name="ce10" office:value-type="float" office:value="32.59" calcext:value-type="float">
            <text:p>32.59</text:p>
          </table:table-cell>
          <table:table-cell table:style-name="ce2"/>
          <table:table-cell table:style-name="ce2" table:formula="of:=([.K4]/[.K10])" office:value-type="float" office:value="100.593433568579" calcext:value-type="float">
            <text:p>100.593433568579</text:p>
          </table:table-cell>
          <table:table-cell table:style-name="ce2"/>
          <table:table-cell table:style-name="ce2" table:formula="of:=([.M10]/[.I10])" office:value-type="float" office:value="0.785886199754526" calcext:value-type="float">
            <text:p>0.785886199754526</text:p>
          </table:table-cell>
          <table:table-cell table:style-name="ce7"/>
          <table:table-cell table:style-name="ce2" office:value-type="float" office:value="127" calcext:value-type="float">
            <text:p>127</text:p>
          </table:table-cell>
          <table:table-cell table:style-name="ce10"/>
          <table:table-cell table:style-name="ce2" office:value-type="float" office:value="127" calcext:value-type="float">
            <text:p>127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/>
          <table:table-cell table:style-name="ce2" office:value-type="float" office:value="31.05" calcext:value-type="float">
            <text:p>31.05</text:p>
          </table:table-cell>
          <table:table-cell table:style-name="ce2"/>
          <table:table-cell table:style-name="ce2" table:formula="of:=([.C4]/[.C11])" office:value-type="float" office:value="105.582608695652" calcext:value-type="float">
            <text:p>105.582608695652</text:p>
          </table:table-cell>
          <table:table-cell table:style-name="ce2"/>
          <table:table-cell table:style-name="ce2" table:formula="of:=([.E11]/[.A11])" office:value-type="float" office:value="0.414049445865303" calcext:value-type="float">
            <text:p>0.414049445865303</text:p>
          </table:table-cell>
          <table:table-cell table:style-name="ce7"/>
          <table:table-cell table:style-name="ce2" office:value-type="float" office:value="256" calcext:value-type="float">
            <text:p>256</text:p>
          </table:table-cell>
          <table:table-cell/>
          <table:table-cell table:style-name="ce10" office:value-type="float" office:value="19.08" calcext:value-type="float">
            <text:p>19.08</text:p>
          </table:table-cell>
          <table:table-cell/>
          <table:table-cell table:style-name="ce2" table:formula="of:=([.K4]/[.K11])" office:value-type="float" office:value="171.820754716981" calcext:value-type="float">
            <text:p>171.820754716981</text:p>
          </table:table-cell>
          <table:table-cell/>
          <table:table-cell table:style-name="ce2" table:formula="of:=([.M11]/[.I11])" office:value-type="float" office:value="0.671174823113208" calcext:value-type="float">
            <text:p>0.671174823113208</text:p>
          </table:table-cell>
          <table:table-cell table:style-name="ce7"/>
          <table:table-cell table:style-name="ce2" office:value-type="float" office:value="255" calcext:value-type="float">
            <text:p>255</text:p>
          </table:table-cell>
          <table:table-cell table:style-name="ce10"/>
          <table:table-cell table:style-name="ce10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/>
          <table:table-cell table:style-name="ce2" office:value-type="float" office:value="21.13" calcext:value-type="float">
            <text:p>21.13</text:p>
          </table:table-cell>
          <table:table-cell table:style-name="ce2"/>
          <table:table-cell table:style-name="ce2" table:formula="of:=([.C4]/[.C12])" office:value-type="float" office:value="155.150970184572" calcext:value-type="float">
            <text:p>155.150970184572</text:p>
          </table:table-cell>
          <table:table-cell table:style-name="ce2"/>
          <table:table-cell table:style-name="ce2" table:formula="of:=([.E12]/[.A12])" office:value-type="float" office:value="0.303622250850434" calcext:value-type="float">
            <text:p>0.303622250850434</text:p>
          </table:table-cell>
          <table:table-cell table:style-name="ce7"/>
          <table:table-cell table:style-name="ce2" office:value-type="float" office:value="512" calcext:value-type="float">
            <text:p>512</text:p>
          </table:table-cell>
          <table:table-cell/>
          <table:table-cell table:style-name="ce10" office:value-type="float" office:value="16.36" calcext:value-type="float">
            <text:p>16.36</text:p>
          </table:table-cell>
          <table:table-cell/>
          <table:table-cell table:style-name="ce2" table:formula="of:=([.K4]/[.K12])" office:value-type="float" office:value="200.387530562347" calcext:value-type="float">
            <text:p>200.387530562347</text:p>
          </table:table-cell>
          <table:table-cell/>
          <table:table-cell table:style-name="ce2" table:formula="of:=([.M12]/[.I12])" office:value-type="float" office:value="0.391381895629584" calcext:value-type="float">
            <text:p>0.391381895629584</text:p>
          </table:table-cell>
          <table:table-cell table:style-name="ce7"/>
          <table:table-cell table:style-name="ce2" office:value-type="float" office:value="1023" calcext:value-type="float">
            <text:p>1023</text:p>
          </table:table-cell>
          <table:table-cell table:style-name="ce10"/>
          <table:table-cell table:style-name="ce10"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/>
          <table:table-cell table:style-name="ce2" office:value-type="float" office:value="24.55" calcext:value-type="float">
            <text:p>24.55</text:p>
          </table:table-cell>
          <table:table-cell/>
          <table:table-cell table:style-name="ce2" table:formula="of:=([.C4]/[.C13])" office:value-type="float" office:value="133.537270875764" calcext:value-type="float">
            <text:p>133.537270875764</text:p>
          </table:table-cell>
          <table:table-cell/>
          <table:table-cell table:style-name="ce2" table:formula="of:=([.E13]/[.A13])" office:value-type="float" office:value="0.130534966642975" calcext:value-type="float">
            <text:p>0.130534966642975</text:p>
          </table:table-cell>
          <table:table-cell/>
          <table:table-cell table:style-name="ce2" office:value-type="float" office:value="1024" calcext:value-type="float">
            <text:p>1024</text:p>
          </table:table-cell>
          <table:table-cell/>
          <table:table-cell table:style-name="ce10" office:value-type="float" office:value="22.31" calcext:value-type="float">
            <text:p>22.31</text:p>
          </table:table-cell>
          <table:table-cell/>
          <table:table-cell table:style-name="ce2" table:formula="of:=([.K4]/[.K13])" office:value-type="float" office:value="146.944867772299" calcext:value-type="float">
            <text:p>146.944867772299</text:p>
          </table:table-cell>
          <table:table-cell/>
          <table:table-cell table:style-name="ce2" table:formula="of:=([.M13]/[.I13])" office:value-type="float" office:value="0.143500847433886" calcext:value-type="float">
            <text:p>0.143500847433886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/>
          <table:table-cell/>
          <table:table-cell table:style-name="ce2"/>
          <table:table-cell table:number-columns-repeated="8"/>
        </table:table-row>
        <table:table-row table:style-name="ro1" table:number-rows-repeated="104856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1:21:17.136547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09:26.015027750</meta:creation-date>
    <dc:date>2026-06-22T15:06:29.146454614</dc:date>
    <meta:editing-duration>PT13H36M50S</meta:editing-duration>
    <meta:editing-cycles>107</meta:editing-cycles>
    <meta:generator>LibreOffice/24.2.7.2$Linux_X86_64 LibreOffice_project/420$Build-2</meta:generator>
    <meta:document-statistic meta:table-count="1" meta:cell-count="1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interval-major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47cm" svg:height="14.079cm" xlink:href=".." xlink:type="simple" chart:class="chart:bar" chart:column-mapping="1 3 0 2" chart:style-name="ch1">
        <chart:title svg:x="10.114cm" svg:y="0.417cm" chart:style-name="ch2">
          <text:p>Escalabilidade Forte</text:p>
        </chart:title>
        <chart:legend chart:legend-position="end" svg:x="18.231cm" svg:y="5.993cm" style:legend-expansion="high" chart:style-name="ch3"/>
        <chart:plot-area chart:style-name="ch4" table:cell-range-address="Sheet1.A4:Sheet1.A13 Sheet1.G3:Sheet1.G13 Sheet1.O3:Sheet1.O13 Sheet1.E3:Sheet1.E13 Sheet1.M3:Sheet1.M13" chart:data-source-has-labels="both" svg:x="2.431cm" svg:y="1.477cm" svg:width="13.357cm" svg:height="11.34cm">
          <chart:coordinate-region svg:x="3.238cm" svg:y="1.676cm" svg:width="11.928cm" svg:height="10.494cm"/>
          <chart:axis chart:dimension="x" chart:name="primary-x" chart:style-name="ch5" chartooo:axis-type="auto">
            <chartooo:date-scale/>
            <chart:title svg:x="8.311cm" svg:y="13.098cm" chart:style-name="ch6">
              <text:p>Processos</text:p>
            </chart:title>
            <chart:categories table:cell-range-address="Sheet1.A4:Sheet1.A13"/>
          </chart:axis>
          <chart:axis chart:dimension="y" chart:name="primary-y" chart:style-name="ch7">
            <chart:title svg:x="0.451cm" svg:y="6.867cm" chart:style-name="ch6">
              <text:p>Speed-up</text:p>
            </chart:title>
            <chart:grid chart:style-name="ch8" chart:class="major"/>
          </chart:axis>
          <chart:axis chart:dimension="y" chart:name="secondary-y" chart:style-name="ch9">
            <chart:title svg:x="16.277cm" svg:y="6.867cm" chart:style-name="ch6">
              <text:p>Eficiência</text:p>
            </chart:title>
          </chart:axis>
          <chart:series chart:attached-axis="secondary-y" chart:style-name="ch10" chart:values-cell-range-address="Sheet1.G4:Sheet1.G13" chart:label-cell-address="Sheet1.G3:Sheet1.G3" chart:class="chart:bar">
            <chart:data-point chart:repeated="10"/>
          </chart:series>
          <chart:series chart:attached-axis="secondary-y" chart:style-name="ch11" chart:values-cell-range-address="Sheet1.O4:Sheet1.O13" chart:label-cell-address="Sheet1.O3:Sheet1.O3" chart:class="chart:bar">
            <chart:data-point chart:repeated="10"/>
          </chart:series>
          <chart:series chart:attached-axis="primary-y" chart:style-name="ch12" chart:values-cell-range-address="Sheet1.E4:Sheet1.E13" chart:label-cell-address="Sheet1.E3:Sheet1.E3" chart:class="chart:line">
            <chart:data-point chart:repeated="10"/>
          </chart:series>
          <chart:series chart:attached-axis="primary-y" chart:style-name="ch13" chart:values-cell-range-address="Sheet1.M4:Sheet1.M13" chart:label-cell-address="Sheet1.M3:Sheet1.M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(sem balanceamento)</text:p>
                <draw:g>
                  <svg:desc>Sheet1.G3:Sheet1.G3</svg:desc>
                </draw:g>
              </table:table-cell>
              <table:table-cell office:value-type="string">
                <text:p>Eficiência (com balanceamento)</text:p>
                <draw:g>
                  <svg:desc>Sheet1.O3:Sheet1.O3</svg:desc>
                </draw:g>
              </table:table-cell>
              <table:table-cell office:value-type="string">
                <text:p>Speed-up (sem balanceamento)</text:p>
                <draw:g>
                  <svg:desc>Sheet1.E3:Sheet1.E3</svg:desc>
                </draw:g>
              </table:table-cell>
              <table:table-cell office:value-type="string">
                <text:p>Speed-up (com balanceamento)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G4:Sheet1.G13</svg:desc>
                </draw:g>
              </table:table-cell>
              <table:table-cell office:value-type="float" office:value="1">
                <text:p>1</text:p>
                <draw:g>
                  <svg:desc>Sheet1.O4:Sheet1.O13</svg:desc>
                </draw:g>
              </table:table-cell>
              <table:table-cell office:value-type="float" office:value="1">
                <text:p>1</text:p>
                <draw:g>
                  <svg:desc>Sheet1.E4:Sheet1.E13</svg:desc>
                </draw:g>
              </table:table-cell>
              <table:table-cell office:value-type="float" office:value="1">
                <text:p>1</text:p>
                <draw:g>
                  <svg:desc>Sheet1.M4:Sheet1.M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1183333333333">
                <text:p>1.01183333333333</text:p>
              </table:table-cell>
              <table:table-cell office:value-type="float" office:value="0.843116378113138">
                <text:p>0.843116378113138</text:p>
              </table:table-cell>
              <table:table-cell office:value-type="float" office:value="3.0355">
                <text:p>3.0355</text:p>
              </table:table-cell>
              <table:table-cell office:value-type="float" office:value="3.37246551245255">
                <text:p>3.372465512452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9269179136243">
                <text:p>1.19269179136243</text:p>
              </table:table-cell>
              <table:table-cell office:value-type="float" office:value="1.69637165210912">
                <text:p>1.69637165210912</text:p>
              </table:table-cell>
              <table:table-cell office:value-type="float" office:value="8.34884253953702">
                <text:p>8.34884253953702</text:p>
              </table:table-cell>
              <table:table-cell office:value-type="float" office:value="13.570973216873">
                <text:p>13.5709732168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9525452976704">
                <text:p>2.09525452976704</text:p>
              </table:table-cell>
              <table:table-cell office:value-type="float" office:value="3.18063101521267">
                <text:p>3.18063101521267</text:p>
              </table:table-cell>
              <table:table-cell office:value-type="float" office:value="31.4288179465056">
                <text:p>31.4288179465056</text:p>
              </table:table-cell>
              <table:table-cell office:value-type="float" office:value="50.8900962434027">
                <text:p>50.89009624340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06429297562669">
                <text:p>4.06429297562669</text:p>
              </table:table-cell>
              <table:table-cell office:value-type="float" office:value="6.41102158948686">
                <text:p>6.41102158948686</text:p>
              </table:table-cell>
              <table:table-cell office:value-type="float" office:value="125.993082244427">
                <text:p>125.993082244427</text:p>
              </table:table-cell>
              <table:table-cell office:value-type="float" office:value="205.152690863579">
                <text:p>205.1526908635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14747129118387">
                <text:p>0.314747129118387</text:p>
              </table:table-cell>
              <table:table-cell office:value-type="float" office:value="0.803136759172154">
                <text:p>0.803136759172154</text:p>
              </table:table-cell>
              <table:table-cell office:value-type="float" office:value="19.8290691344584">
                <text:p>19.8290691344584</text:p>
              </table:table-cell>
              <table:table-cell office:value-type="float" office:value="51.4007525870179">
                <text:p>51.40075258701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5366785215117">
                <text:p>0.45366785215117</text:p>
              </table:table-cell>
              <table:table-cell office:value-type="float" office:value="0.785886199754526">
                <text:p>0.785886199754526</text:p>
              </table:table-cell>
              <table:table-cell office:value-type="float" office:value="57.6158172231986">
                <text:p>57.6158172231986</text:p>
              </table:table-cell>
              <table:table-cell office:value-type="float" office:value="100.593433568579">
                <text:p>100.59343356857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14049445865303">
                <text:p>0.414049445865303</text:p>
              </table:table-cell>
              <table:table-cell office:value-type="float" office:value="0.671174823113208">
                <text:p>0.671174823113208</text:p>
              </table:table-cell>
              <table:table-cell office:value-type="float" office:value="105.582608695652">
                <text:p>105.582608695652</text:p>
              </table:table-cell>
              <table:table-cell office:value-type="float" office:value="171.820754716981">
                <text:p>171.82075471698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303622250850434">
                <text:p>0.303622250850434</text:p>
              </table:table-cell>
              <table:table-cell office:value-type="float" office:value="0.391381895629584">
                <text:p>0.391381895629584</text:p>
              </table:table-cell>
              <table:table-cell office:value-type="float" office:value="155.150970184572">
                <text:p>155.150970184572</text:p>
              </table:table-cell>
              <table:table-cell office:value-type="float" office:value="200.387530562347">
                <text:p>200.387530562347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130534966642975">
                <text:p>0.130534966642975</text:p>
              </table:table-cell>
              <table:table-cell office:value-type="float" office:value="0.143500847433886">
                <text:p>0.143500847433886</text:p>
              </table:table-cell>
              <table:table-cell office:value-type="float" office:value="133.537270875764">
                <text:p>133.537270875764</text:p>
              </table:table-cell>
              <table:table-cell office:value-type="float" office:value="146.944867772299">
                <text:p>146.944867772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